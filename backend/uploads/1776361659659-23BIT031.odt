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P2" style:parent-style-name="Textbody" style:family="paragraph"/>
    <style:style style:name="T3" style:parent-style-name="DefaultParagraphFont" style:family="text">
      <style:text-properties fo:font-weight="bold" style:font-weight-asian="bold"/>
    </style:style>
    <style:style style:name="P4" style:parent-style-name="Textbody" style:family="paragraph"/>
    <style:style style:name="T5" style:parent-style-name="DefaultParagraphFont" style:family="text">
      <style:text-properties fo:font-weight="bold" style:font-weight-asian="bold"/>
    </style:style>
    <style:style style:name="P6" style:parent-style-name="Textbody" style:family="paragraph"/>
    <style:style style:name="T7" style:parent-style-name="DefaultParagraphFont" style:family="text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Textbody" style:family="paragraph"/>
    <style:style style:name="T45" style:parent-style-name="DefaultParagraphFont" style:family="text">
      <style:text-properties fo:font-weight="bold" style:font-weight-asian="bold"/>
    </style:style>
    <style:style style:name="P46" style:parent-style-name="Textbody" style:family="paragraph"/>
    <style:style style:name="T47" style:parent-style-name="DefaultParagraphFont" style:family="text">
      <style:text-properties fo:font-weight="bold" style:font-weight-asian="bold"/>
    </style:style>
    <style:style style:name="P48" style:parent-style-name="Textbody" style:family="paragraph"/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P55" style:parent-style-name="Standard" style:family="paragraph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P58" style:parent-style-name="Standard" style:family="paragraph">
      <style:text-properties fo:font-size="13pt" style:font-size-asian="13pt" style:font-size-complex="13pt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text-properties fo:font-size="13pt" style:font-size-asian="13pt" style:font-size-complex="13pt"/>
    </style:style>
    <style:style style:name="P61" style:parent-style-name="Standard" style:family="paragraph">
      <style:text-properties fo:font-size="13pt" style:font-size-asian="13pt" style:font-size-complex="13pt"/>
    </style:style>
    <style:style style:name="P62" style:parent-style-name="Standard" style:family="paragraph">
      <style:text-properties fo:font-size="13pt" style:font-size-asian="13pt" style:font-size-complex="13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Textbody" style:family="paragraph"/>
    <style:style style:name="T88" style:parent-style-name="DefaultParagraphFont" style:family="text">
      <style:text-properties fo:font-weight="bold" style:font-weight-asian="bold"/>
    </style:style>
    <style:style style:name="P89" style:parent-style-name="Textbody" style:family="paragraph"/>
    <style:style style:name="T90" style:parent-style-name="DefaultParagraphFont" style:family="text">
      <style:text-properties fo:font-weight="bold" style:font-weight-asian="bold"/>
    </style:style>
    <style:style style:name="P91" style:parent-style-name="Textbody" style:family="paragraph"/>
    <style:style style:name="T92" style:parent-style-name="DefaultParagraphFont" style:family="text">
      <style:text-properties fo:font-weight="bold" style:font-weight-asian="bold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5" style:parent-style-name="DefaultParagraphFont" style:family="text">
      <style:text-properties fo:font-size="13pt" style:font-size-asian="13pt" style:font-size-complex="13pt"/>
    </style:style>
    <style:style style:name="T96" style:parent-style-name="DefaultParagraphFont" style:family="text">
      <style:text-properties fo:font-size="13pt" style:font-size-asian="13pt" style:font-size-complex="13pt"/>
    </style:style>
    <style:style style:name="T97" style:parent-style-name="DefaultParagraphFont" style:family="text">
      <style:text-properties fo:font-size="13pt" style:font-size-asian="13pt" style:font-size-complex="13pt"/>
    </style:style>
    <style:style style:name="T98" style:parent-style-name="DefaultParagraphFont" style:family="text">
      <style:text-properties fo:font-size="13pt" style:font-size-asian="13pt" style:font-size-complex="13pt"/>
    </style:style>
    <style:style style:name="T99" style:parent-style-name="DefaultParagraphFont" style:family="text">
      <style:text-properties fo:font-size="13pt" style:font-size-asian="13pt" style:font-size-complex="13pt"/>
    </style:style>
    <style:style style:name="T100" style:parent-style-name="DefaultParagraphFont" style:family="text">
      <style:text-properties fo:font-size="13pt" style:font-size-asian="13pt" style:font-size-complex="13pt"/>
    </style:style>
    <style:style style:name="T101" style:parent-style-name="DefaultParagraphFont" style:family="text">
      <style:text-properties fo:font-size="13pt" style:font-size-asian="13pt" style:font-size-complex="13pt"/>
    </style:style>
    <style:style style:name="T102" style:parent-style-name="DefaultParagraphFont" style:family="text">
      <style:text-properties fo:font-size="13pt" style:font-size-asian="13pt" style:font-size-complex="13pt"/>
    </style:style>
    <style:style style:name="T103" style:parent-style-name="DefaultParagraphFont" style:family="text">
      <style:text-properties fo:font-size="13pt" style:font-size-asian="13pt" style:font-size-complex="13pt"/>
    </style:style>
    <style:style style:name="T104" style:parent-style-name="DefaultParagraphFont" style:family="text">
      <style:text-properties fo:font-size="13pt" style:font-size-asian="13pt" style:font-size-complex="13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Textbody" style:family="paragraph"/>
    <style:style style:name="T132" style:parent-style-name="DefaultParagraphFont" style:family="text">
      <style:text-properties fo:font-weight="bold" style:font-weight-asian="bold"/>
    </style:style>
    <style:style style:name="P133" style:parent-style-name="Textbody" style:family="paragraph"/>
    <style:style style:name="T134" style:parent-style-name="DefaultParagraphFont" style:family="text">
      <style:text-properties fo:font-weight="bold" style:font-weight-asian="bold"/>
    </style:style>
    <style:style style:name="P135" style:parent-style-name="Textbody" style:family="paragraph"/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weight="bold" style:font-weight-asian="bold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fo:font-size="13pt" style:font-size-asian="13pt" style:font-size-complex="13pt"/>
    </style:style>
    <style:style style:name="P141" style:parent-style-name="Standard" style:family="paragraph">
      <style:text-properties fo:font-size="13pt" style:font-size-asian="13pt" style:font-size-complex="13pt"/>
    </style:style>
    <style:style style:name="P142" style:parent-style-name="Standard" style:family="paragraph">
      <style:text-properties fo:font-size="13pt" style:font-size-asian="13pt" style:font-size-complex="13pt"/>
    </style:style>
    <style:style style:name="P143" style:parent-style-name="Standard" style:family="paragraph">
      <style:text-properties fo:font-size="13pt" style:font-size-asian="13pt" style:font-size-complex="13pt"/>
    </style:style>
    <style:style style:name="P144" style:parent-style-name="Standard" style:family="paragraph">
      <style:text-properties fo:font-size="13pt" style:font-size-asian="13pt" style:font-size-complex="13pt"/>
    </style:style>
    <style:style style:name="P145" style:parent-style-name="Standard" style:family="paragraph">
      <style:text-properties fo:font-size="13pt" style:font-size-asian="13pt" style:font-size-complex="13pt"/>
    </style:style>
    <style:style style:name="P146" style:parent-style-name="Standard" style:family="paragraph">
      <style:text-properties fo:font-size="13pt" style:font-size-asian="13pt" style:font-size-complex="13pt"/>
    </style:style>
    <style:style style:name="P147" style:parent-style-name="Standard" style:family="paragraph">
      <style:text-properties fo:font-size="13pt" style:font-size-asian="13pt" style:font-size-complex="13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6" style:parent-style-name="Textbody" style:family="paragraph"/>
    <style:style style:name="T177" style:parent-style-name="DefaultParagraphFont" style:family="text">
      <style:text-properties fo:font-weight="bold" style:font-weight-asian="bold"/>
    </style:style>
    <style:style style:name="P178" style:parent-style-name="Textbody" style:family="paragraph"/>
    <style:style style:name="T179" style:parent-style-name="DefaultParagraphFont" style:family="text">
      <style:text-properties fo:font-weight="bold" style:font-weight-asian="bold"/>
    </style:style>
    <style:style style:name="P180" style:parent-style-name="Textbody" style:family="paragraph"/>
    <style:style style:name="T181" style:parent-style-name="DefaultParagraphFont" style:family="text">
      <style:text-properties fo:font-weight="bold" style:font-weight-asian="bold"/>
    </style:style>
    <style:style style:name="P1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4" style:parent-style-name="Standard" style:family="paragraph">
      <style:text-properties fo:font-size="13pt" style:font-size-asian="13pt" style:font-size-complex="13pt"/>
    </style:style>
    <style:style style:name="P185" style:parent-style-name="Standard" style:family="paragraph">
      <style:text-properties fo:font-size="13pt" style:font-size-asian="13pt" style:font-size-complex="13pt"/>
    </style:style>
    <style:style style:name="P186" style:parent-style-name="Standard" style:family="paragraph">
      <style:text-properties fo:font-size="13pt" style:font-size-asian="13pt" style:font-size-complex="13pt"/>
    </style:style>
    <style:style style:name="P187" style:parent-style-name="Standard" style:family="paragraph">
      <style:text-properties fo:font-size="13pt" style:font-size-asian="13pt" style:font-size-complex="13pt"/>
    </style:style>
    <style:style style:name="P188" style:parent-style-name="Standard" style:family="paragraph">
      <style:text-properties fo:font-size="13pt" style:font-size-asian="13pt" style:font-size-complex="13pt"/>
    </style:style>
    <style:style style:name="P189" style:parent-style-name="Standard" style:family="paragraph">
      <style:text-properties fo:font-size="13pt" style:font-size-asian="13pt" style:font-size-complex="13pt"/>
    </style:style>
    <style:style style:name="P190" style:parent-style-name="Standard" style:family="paragraph">
      <style:text-properties fo:font-size="13pt" style:font-size-asian="13pt" style:font-size-complex="13pt"/>
    </style:style>
    <style:style style:name="P191" style:parent-style-name="Standard" style:family="paragraph">
      <style:text-properties fo:font-size="13pt" style:font-size-asian="13pt" style:font-size-complex="13pt"/>
    </style:style>
    <style:style style:name="P192" style:parent-style-name="Standard" style:family="paragraph">
      <style:text-properties fo:font-size="13pt" style:font-size-asian="13pt" style:font-size-complex="13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3">1. The Line Chart: Tracking Trends</text:h>
      <text:list text:style-name="LFO1" text:continue-numbering="true">
        <text:list-item>
          <text:p text:style-name="P2"><text:span text:style-name="T3">Dataset:</text:span><text:s/><text:span text:style-name="SourceText">AirPassengers</text:span><text:s/>(Historical airline passenger data).</text:p>
        </text:list-item>
        <text:list-item>
          <text:p text:style-name="P4"><text:span text:style-name="T5">Why:</text:span><text:s/>To visualize the "flow of time" and the velocity of growth.</text:p>
        </text:list-item>
        <text:list-item>
          <text:p text:style-name="P6"><text:span text:style-name="T7">Psychological Win:</text:span><text:s/>It prevents the viewer from seeing data as isolated snapshots and forces them to see the continuous narrative of growth.</text:p>
        </text:list-item>
      </text:list>
      <text:p text:style-name="P8">R code:</text:p>
      <text:p text:style-name="Standard"/>
      <text:p text:style-name="Standard"><text:tab/><text:span text:style-name="T9"># Saving for Linux</text:span></text:p>
      <text:p text:style-name="P10"><text:tab/>png("traffic_trend.png")</text:p>
      <text:p text:style-name="P11"><text:tab/></text:p>
      <text:p text:style-name="P12"><text:tab/># Using 'AirPassengers' dataset</text:p>
      <text:p text:style-name="P13"><text:tab/>data(AirPassengers)</text:p>
      <text:p text:style-name="P14"><text:tab/>plot(AirPassengers, col="blue", lwd=2,</text:p>
      <text:p text:style-name="P15"><text:tab/><text:s text:c="5"/>main="Monthly Passenger Traffic (1949-1960)",</text:p>
      <text:p text:style-name="P16"><text:tab/><text:s text:c="5"/>xlab="Year", ylab="Total Passengers",</text:p>
      <text:p text:style-name="P17"><text:tab/><text:s text:c="5"/>sub="Psychological Win: Visualizing the flow of time")</text:p>
      <text:p text:style-name="P18"><text:tab/>dev.off()</text:p>
      <text:p text:style-name="Standard"/>
      <text:p text:style-name="P19">Output:</text:p>
      <text:p text:style-name="Standard"><text:span text:style-name="T20"><draw:frame draw:z-index="251658240" draw:style-name="a0" draw:name="Image1" text:anchor-type="paragraph" svg:x="0in" svg:y="0in" svg:width="5in" svg:height="5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h text:style-name="Heading3" text:outline-level="3">2. The Bar Chart: Categorical Ranking</text:h>
      <text:list text:style-name="LFO2" text:continue-numbering="true">
        <text:list-item>
          <text:p text:style-name="P44"><text:span text:style-name="T45">Dataset:</text:span><text:s/><text:span text:style-name="SourceText">mtcars</text:span><text:s/>(Motor Trend Car Road Tests).</text:p>
        </text:list-item>
        <text:list-item>
          <text:p text:style-name="P46"><text:span text:style-name="T47">Why:</text:span><text:s/>Humans are extremely accurate at judging differences in length/height from a common baseline.</text:p>
        </text:list-item>
        <text:list-item>
          <text:p text:style-name="P48"><text:span text:style-name="T49">Psychological Win:</text:span><text:s/>It makes "Who is winning?" or "Which category is the biggest?" instantly obvious without needing to read raw numbers.</text:p>
        </text:list-item>
      </text:list>
      <text:p text:style-name="P50">R code:</text:p>
      <text:p text:style-name="P51"/>
      <text:p text:style-name="Standard"><text:tab/><text:span text:style-name="T52">png("car_comparison.png")</text:span></text:p>
      <text:p text:style-name="P53"/>
      <text:p text:style-name="P54"><text:tab/># Counting how many cars have 4, 6, or 8 cylinders</text:p>
      <text:p text:style-name="P55"><text:tab/>cyl_counts &lt;- table(mtcars$cyl)</text:p>
      <text:p text:style-name="P56"><text:tab/></text:p>
      <text:p text:style-name="P57"><text:tab/>barplot(cyl_counts, col=c("skyblue", "orange", "red"),</text:p>
      <text:p text:style-name="P58"><text:tab/><text:s text:c="8"/>main="Car Count by Cylinder",</text:p>
      <text:p text:style-name="P59"><text:tab/><text:s text:c="8"/>xlab="Number of Cylinders", ylab="Number of Cars",</text:p>
      <text:p text:style-name="P60"><text:tab/><text:s text:c="8"/>sub="Psychological Win: Instant ranking via relative heights")</text:p>
      <text:p text:style-name="P61"><text:tab/></text:p>
      <text:p text:style-name="P62"><text:tab/>dev.off()</text:p>
      <text:p text:style-name="Standard"/>
      <text:p text:style-name="P63">Output:</text:p>
      <text:p text:style-name="Standard"><text:span text:style-name="T64"><draw:frame draw:z-index="251659264" draw:style-name="a1" draw:name="Image2" text:anchor-type="paragraph" svg:x="0in" svg:y="0in" svg:width="5in" svg:height="5in" style:rel-width="scale" style:rel-height="scale"><draw:image xlink:href="media/image2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h text:style-name="Heading3" text:outline-level="3">3. The Scatter Plot: Correlation Analysis</text:h>
      <text:list text:style-name="LFO3" text:continue-numbering="true">
        <text:list-item>
          <text:p text:style-name="P87"><text:span text:style-name="T88">Dataset:</text:span><text:s/><text:span text:style-name="SourceText">trees</text:span><text:s/>(Girth and Volume of Black Cherry Trees).</text:p>
        </text:list-item>
        <text:list-item>
          <text:p text:style-name="P89"><text:span text:style-name="T90">Why:</text:span><text:s/>To identify the relationship between two variables and spot outliers.</text:p>
        </text:list-item>
        <text:list-item>
          <text:p text:style-name="P91"><text:span text:style-name="T92">Psychological Win:</text:span><text:s/>It answers the "What if?" question. For example: "If Girth increases, what happens to Volume?"</text:p>
        </text:list-item>
      </text:list>
      <text:p text:style-name="P93">R code:</text:p>
      <text:p text:style-name="P94"/>
      <text:p text:style-name="Standard"><text:tab/><text:span text:style-name="T95">png("tree_correlation.png")</text:span></text:p>
      <text:p text:style-name="Standard"><text:span text:style-name="T96"><text:tab/># Relationship between Tree Girth and Volume</text:span></text:p>
      <text:p text:style-name="Standard"><text:span text:style-name="T97"><text:tab/>data(trees)</text:span></text:p>
      <text:p text:style-name="Standard"><text:span text:style-name="T98"><text:tab/>plot(trees$Girth, trees$Volume, pch=19, col="darkgreen",</text:span></text:p>
      <text:p text:style-name="Standard"><text:span text:style-name="T99"><text:tab/><text:s text:c="5"/>main="Tree Girth vs Volume",</text:span></text:p>
      <text:p text:style-name="Standard"><text:span text:style-name="T100"><text:tab/><text:s text:c="5"/>xlab="Girth (inches)", ylab="Volume (cubic ft)")</text:span></text:p>
      <text:p text:style-name="Standard"><text:span text:style-name="T101"><text:tab/># Adding a trend line (Linear Regression)</text:span></text:p>
      <text:p text:style-name="Standard"><text:span text:style-name="T102"><text:tab/>abline(lm(Volume ~ Girth, data=trees), col="red", lwd=2)</text:span><text:span text:style-name="T103"><text:tab/></text:span></text:p>
      <text:p text:style-name="Standard"><text:span text:style-name="T104"><text:tab/>dev.off()</text:span></text:p>
      <text:p text:style-name="P105"/>
      <text:p text:style-name="P106"/>
      <text:p text:style-name="P107">Output:</text:p>
      <text:p text:style-name="P108"/>
      <text:p text:style-name="P109"/>
      <text:p text:style-name="P110"/>
      <text:p text:style-name="Standard"><text:span text:style-name="T111"><draw:frame draw:z-index="2" draw:style-name="a2" draw:name="Image3" text:anchor-type="paragraph" svg:x="0.9375in" svg:y="0.00694in" svg:width="4.5in" svg:height="4.26667in" style:rel-width="scale" style:rel-height="scale"><draw:image xlink:href="media/image3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soft-page-break/>
      <text:h text:style-name="Heading3" text:outline-level="3">4. The Boxplot: Quality &amp; Consistency</text:h>
      <text:list text:style-name="LFO4" text:continue-numbering="true">
        <text:list-item>
          <text:p text:style-name="P131"><text:span text:style-name="T132">Dataset:</text:span><text:s/><text:span text:style-name="SourceText">chickwts</text:span><text:s/>(Chicken weights based on different feed types).</text:p>
        </text:list-item>
        <text:list-item>
          <text:p text:style-name="P133"><text:span text:style-name="T134">Why:</text:span><text:s/>A simple average can be misleading; a boxplot shows the distribution and variance.</text:p>
        </text:list-item>
        <text:list-item>
          <text:p text:style-name="P135"><text:span text:style-name="T136">Psychological Win:</text:span><text:s/>It visualizes<text:s/><text:span text:style-name="T137">Risk and Consistency</text:span>. It tells the viewer: "How much can I trust this specific group?"</text:p>
        </text:list-item>
      </text:list>
      <text:p text:style-name="P138">R code:</text:p>
      <text:p text:style-name="P139"/>
      <text:p text:style-name="Standard"><text:tab/><text:span text:style-name="T140">png("feed_consistency.png")</text:span></text:p>
      <text:p text:style-name="P141"><text:tab/># Comparing weights across different feed types</text:p>
      <text:p text:style-name="P142"><text:tab/>data(chickwts)</text:p>
      <text:p text:style-name="P143"><text:tab/>boxplot(weight ~ feed, data=chickwts, col="lightgray", las=2,</text:p>
      <text:p text:style-name="P144"><text:tab/><text:s text:c="8"/>main="Chicken Weight by Feed Type",</text:p>
      <text:p text:style-name="P145"><text:tab/><text:s text:c="8"/>ylab="Weight (grams)",</text:p>
      <text:p text:style-name="P146"><text:tab/><text:s text:c="8"/>sub="Psychological Win: Visualizing Risk and Consistency")</text:p>
      <text:p text:style-name="P147"><text:tab/>dev.off()</text:p>
      <text:p text:style-name="P148"/>
      <text:p text:style-name="P149">Output:</text:p>
      <text:p text:style-name="P150"/>
      <text:p text:style-name="Standard"><text:span text:style-name="T151"><draw:frame draw:z-index="3" draw:style-name="a3" draw:name="Image4" text:anchor-type="paragraph" svg:x="0.90905in" svg:y="0.07835in" svg:width="5in" svg:height="5in" style:rel-width="scale" style:rel-height="scale"><draw:image xlink:href="media/image4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h text:style-name="Heading3" text:outline-level="3">5. The Histogram: Frequency Distribution</text:h>
      <text:list text:style-name="LFO5" text:continue-numbering="true">
        <text:list-item>
          <text:p text:style-name="P176"><text:span text:style-name="T177">Dataset:</text:span><text:s/><text:span text:style-name="SourceText">faithful</text:span><text:s/>(Waiting time between eruptions for the Old Faithful geyser).</text:p>
        </text:list-item>
        <text:list-item>
          <text:p text:style-name="P178"><text:span text:style-name="T179">Why:</text:span><text:s/>It reveals the "density" and underlying patterns of a population.</text:p>
        </text:list-item>
        <text:list-item>
          <text:p text:style-name="P180"><text:span text:style-name="T181">Psychological Win:</text:span><text:s/>It reveals the "Normal Curve" (the bell curve) or Bi-modal patterns (two distinct peaks).</text:p>
        </text:list-item>
      </text:list>
      <text:p text:style-name="P182">R code:</text:p>
      <text:p text:style-name="P183"/>
      <text:p text:style-name="P184"><text:tab/>png("eruption_frequency.png")</text:p>
      <text:p text:style-name="P185"><text:tab/># Distribution of waiting time between eruptions</text:p>
      <text:p text:style-name="P186"><text:tab/>data(faithful)</text:p>
      <text:p text:style-name="P187"><text:tab/>hist(faithful$waiting, col="darkorchid", border="white",</text:p>
      <text:p text:style-name="P188"><text:tab/><text:s text:c="5"/>main="Waiting Time Between Eruptions",</text:p>
      <text:p text:style-name="P189"><text:tab/><text:s text:c="5"/>xlab="Minutes", ylab="Frequency",</text:p>
      <text:p text:style-name="P190"><text:tab/><text:s text:c="5"/>sub="Psychological Win: Revealing the Distribution Density")<text:tab/></text:p>
      <text:p text:style-name="P191"><text:tab/>dev.off()</text:p>
      <text:p text:style-name="P192"/>
      <text:p text:style-name="P193">Output:</text:p>
      <text:p text:style-name="Standard"><text:span text:style-name="T194"><draw:frame draw:z-index="4" draw:style-name="a4" draw:name="Image5" text:anchor-type="paragraph" svg:x="1.00276in" svg:y="0.42717in" svg:width="5in" svg:height="5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onn arasi</dc:creator>
    <meta:creation-date>2026-03-26T10:07:00Z</meta:creation-date>
    <dc:date>2026-03-27T16:43:00Z</dc:date>
    <meta:template xlink:href="Normal" xlink:type="simple"/>
    <meta:editing-cycles>2</meta:editing-cycles>
    <meta:editing-duration>PT720S</meta:editing-duration>
    <meta:document-statistic meta:page-count="5" meta:paragraph-count="6" meta:word-count="501" meta:character-count="3355" meta:row-count="23" meta:non-whitespace-character-count="2860"/>
  </office:meta>
</office:document-meta>
</file>